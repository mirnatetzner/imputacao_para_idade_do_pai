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mo_sinasc_por_uf_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Número de Registros </text:p>
          </table:table-cell>
          <table:table-cell office:value-type="string" calcext:value-type="string">
            <text:p>Distribuição (%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re</text:p>
          </table:table-cell>
          <table:table-cell table:style-name="ce2" office:value-type="float" office:value="14483" calcext:value-type="float">
            <text:p>14.483</text:p>
          </table:table-cell>
          <table:table-cell table:style-name="ce3" office:value-type="percentage" office:value="0.00565317757527357" calcext:value-type="percentage">
            <text:p>0,57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agoas</text:p>
          </table:table-cell>
          <table:table-cell table:style-name="ce2" office:value-type="float" office:value="45742" calcext:value-type="float">
            <text:p>45.742</text:p>
          </table:table-cell>
          <table:table-cell table:style-name="ce3" office:value-type="percentage" office:value="0.0178545638782133" calcext:value-type="percentage">
            <text:p>1,79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mapá</text:p>
          </table:table-cell>
          <table:table-cell table:style-name="ce2" office:value-type="float" office:value="13615" calcext:value-type="float">
            <text:p>13.615</text:p>
          </table:table-cell>
          <table:table-cell table:style-name="ce3" office:value-type="percentage" office:value="0.00531436944606432" calcext:value-type="percentage">
            <text:p>0,53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2" office:value-type="float" office:value="72519" calcext:value-type="float">
            <text:p>72.519</text:p>
          </table:table-cell>
          <table:table-cell table:style-name="ce3" office:value-type="percentage" office:value="0.0283064823987616" calcext:value-type="percentage">
            <text:p>2,83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hia</text:p>
          </table:table-cell>
          <table:table-cell table:style-name="ce2" office:value-type="float" office:value="173824" calcext:value-type="float">
            <text:p>173.824</text:p>
          </table:table-cell>
          <table:table-cell table:style-name="ce3" office:value-type="percentage" office:value="0.0678490601977734" calcext:value-type="percentage">
            <text:p>6,7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eará</text:p>
          </table:table-cell>
          <table:table-cell table:style-name="ce2" office:value-type="float" office:value="112308" calcext:value-type="float">
            <text:p>112.308</text:p>
          </table:table-cell>
          <table:table-cell table:style-name="ce3" office:value-type="percentage" office:value="0.0438374002018797" calcext:value-type="percentage">
            <text:p>4,3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2" office:value-type="float" office:value="35928" calcext:value-type="float">
            <text:p>35.928</text:p>
          </table:table-cell>
          <table:table-cell table:style-name="ce3" office:value-type="percentage" office:value="0.0140238461592508" calcext:value-type="percentage">
            <text:p>1,40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2" office:value-type="float" office:value="51729" calcext:value-type="float">
            <text:p>51.729</text:p>
          </table:table-cell>
          <table:table-cell table:style-name="ce3" office:value-type="percentage" office:value="0.0201914812394757" calcext:value-type="percentage">
            <text:p>2,02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Goiás</text:p>
          </table:table-cell>
          <table:table-cell table:style-name="ce2" office:value-type="float" office:value="89745" calcext:value-type="float">
            <text:p>89.745</text:p>
          </table:table-cell>
          <table:table-cell table:style-name="ce3" office:value-type="percentage" office:value="0.0350303405021699" calcext:value-type="percentage">
            <text:p>3,50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2" office:value-type="float" office:value="97964" calcext:value-type="float">
            <text:p>97.964</text:p>
          </table:table-cell>
          <table:table-cell table:style-name="ce3" office:value-type="percentage" office:value="0.0382384787671131" calcext:value-type="percentage">
            <text:p>3,82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2" office:value-type="float" office:value="58169" calcext:value-type="float">
            <text:p>58.169</text:p>
          </table:table-cell>
          <table:table-cell table:style-name="ce3" office:value-type="percentage" office:value="0.0227052189723184" calcext:value-type="percentage">
            <text:p>2,27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2" office:value-type="float" office:value="40485" calcext:value-type="float">
            <text:p>40.485</text:p>
          </table:table-cell>
          <table:table-cell table:style-name="ce3" office:value-type="percentage" office:value="0.0158025888375993" calcext:value-type="percentage">
            <text:p>1,5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2" office:value-type="float" office:value="235063" calcext:value-type="float">
            <text:p>235.063</text:p>
          </table:table-cell>
          <table:table-cell table:style-name="ce3" office:value-type="percentage" office:value="0.0917525982445992" calcext:value-type="percentage">
            <text:p>9,1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ará</text:p>
          </table:table-cell>
          <table:table-cell table:style-name="ce2" office:value-type="float" office:value="128000" calcext:value-type="float">
            <text:p>128.000</text:p>
          </table:table-cell>
          <table:table-cell table:style-name="ce3" office:value-type="percentage" office:value="0.0499624890999804" calcext:value-type="percentage">
            <text:p>5,00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2" office:value-type="float" office:value="50892" calcext:value-type="float">
            <text:p>50.892</text:p>
          </table:table-cell>
          <table:table-cell table:style-name="ce3" office:value-type="percentage" office:value="0.0198647734005953" calcext:value-type="percentage">
            <text:p>1,99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araná</text:p>
          </table:table-cell>
          <table:table-cell table:style-name="ce2" office:value-type="float" office:value="140637" calcext:value-type="float">
            <text:p>140.637</text:p>
          </table:table-cell>
          <table:table-cell table:style-name="ce3" office:value-type="percentage" office:value="0.0548951139027652" calcext:value-type="percentage">
            <text:p>5,49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2" office:value-type="float" office:value="117437" calcext:value-type="float">
            <text:p>117.437</text:p>
          </table:table-cell>
          <table:table-cell table:style-name="ce3" office:value-type="percentage" office:value="0.0458394127533937" calcext:value-type="percentage">
            <text:p>4,5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iauí</text:p>
          </table:table-cell>
          <table:table-cell table:style-name="ce2" office:value-type="float" office:value="42247" calcext:value-type="float">
            <text:p>42.247</text:p>
          </table:table-cell>
          <table:table-cell table:style-name="ce3" office:value-type="percentage" office:value="0.0164903537266162" calcext:value-type="percentage">
            <text:p>1,65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2" office:value-type="float" office:value="180369" calcext:value-type="float">
            <text:p>180.369</text:p>
          </table:table-cell>
          <table:table-cell table:style-name="ce3" office:value-type="percentage" office:value="0.070403782784956" calcext:value-type="percentage">
            <text:p>7,04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2" office:value-type="float" office:value="40037" calcext:value-type="float">
            <text:p>40.037</text:p>
          </table:table-cell>
          <table:table-cell table:style-name="ce3" office:value-type="percentage" office:value="0.0156277201257493" calcext:value-type="percentage">
            <text:p>1,56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2" office:value-type="float" office:value="120942" calcext:value-type="float">
            <text:p>120.942</text:p>
          </table:table-cell>
          <table:table-cell table:style-name="ce3" office:value-type="percentage" office:value="0.0472075262244518" calcext:value-type="percentage">
            <text:p>4,72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2" office:value-type="float" office:value="24901" calcext:value-type="float">
            <text:p>24.901</text:p>
          </table:table-cell>
          <table:table-cell table:style-name="ce3" office:value-type="percentage" office:value="0.00971965578967666" calcext:value-type="percentage">
            <text:p>0,97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oraima</text:p>
          </table:table-cell>
          <table:table-cell table:style-name="ce2" office:value-type="float" office:value="13091" calcext:value-type="float">
            <text:p>13.091</text:p>
          </table:table-cell>
          <table:table-cell table:style-name="ce3" office:value-type="percentage" office:value="0.00510983550631128" calcext:value-type="percentage">
            <text:p>0,51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2" office:value-type="float" office:value="98202" calcext:value-type="float">
            <text:p>98.202</text:p>
          </table:table-cell>
          <table:table-cell table:style-name="ce3" office:value-type="percentage" office:value="0.0383313777702834" calcext:value-type="percentage">
            <text:p>3,83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2" office:value-type="float" office:value="512520" calcext:value-type="float">
            <text:p>512.520</text:p>
          </table:table-cell>
          <table:table-cell table:style-name="ce3" office:value-type="percentage" office:value="0.20005292901189" calcext:value-type="percentage">
            <text:p>20,01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ergipe</text:p>
          </table:table-cell>
          <table:table-cell table:style-name="ce2" office:value-type="float" office:value="28524" calcext:value-type="float">
            <text:p>28.524</text:p>
          </table:table-cell>
          <table:table-cell table:style-name="ce3" office:value-type="percentage" office:value="0.0111338284303738" calcext:value-type="percentage">
            <text:p>1,11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2" office:value-type="float" office:value="22549" calcext:value-type="float">
            <text:p>22.549</text:p>
          </table:table-cell>
          <table:table-cell table:style-name="ce3" office:value-type="percentage" office:value="0.00880159505246452" calcext:value-type="percentage">
            <text:p>0,88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27 UFs</text:p>
          </table:table-cell>
          <table:table-cell table:style-name="ce2" office:value-type="float" office:value="2561922" calcext:value-type="float">
            <text:p>2.561.922</text:p>
          </table:table-cell>
          <table:table-cell table:style-name="ce3" office:value-type="percentage" office:value="1" calcext:value-type="percentage">
            <text:p>100,00%</text:p>
          </table:table-cell>
          <table:table-cell/>
          <table:table-cell table:style-name="Default"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 table:number-rows-repeated="28">
          <table:table-cell table:style-name="ce1"/>
          <table:table-cell table:style-name="ce3"/>
          <table:table-cell table:number-columns-repeated="4"/>
        </table:table-row>
        <table:table-row table:style-name="ro1" table:number-rows-repeated="104850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>
        <table:table-column table:style-name="co8" table:default-cell-style-name="Default"/>
        <table:table-column table:style-name="co7" table:default-cell-style-name="ce2"/>
        <table:table-column table:style-name="co7" table:number-columns-repeated="2" table:default-cell-style-name="ce3"/>
        <table:table-row table:style-name="ro1">
          <table:table-cell office:value-type="string" calcext:value-type="string">
            <text:p>UF</text:p>
          </table:table-cell>
          <table:table-cell table:style-name="Default" office:value-type="string" calcext:value-type="string">
            <text:p>Registros com idade do pai faltante</text:p>
          </table:table-cell>
          <table:table-cell table:style-name="ce1" office:value-type="string" calcext:value-type="string">
            <text:p>Percentual Faltante na UF</text:p>
          </table:table-cell>
          <table:table-cell table:style-name="ce1" office:value-type="string" calcext:value-type="string">
            <text:p><text:span text:style-name="T1">Distribuição</text:span> Faltante (%)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2347" calcext:value-type="float">
            <text:p>12.347</text:p>
          </table:table-cell>
          <table:table-cell office:value-type="percentage" office:value="0.852516743768556" calcext:value-type="percentage">
            <text:p>85,25%</text:p>
          </table:table-cell>
          <table:table-cell office:value-type="percentage" office:value="0.00740177230093387" calcext:value-type="percentage">
            <text:p>0,74%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41350" calcext:value-type="float">
            <text:p>41.350</text:p>
          </table:table-cell>
          <table:table-cell office:value-type="percentage" office:value="0.903983210178829" calcext:value-type="percentage">
            <text:p>90,40%</text:p>
          </table:table-cell>
          <table:table-cell office:value-type="percentage" office:value="0.0247884736894481" calcext:value-type="percentage">
            <text:p>2,48%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3007" calcext:value-type="float">
            <text:p>13.007</text:p>
          </table:table-cell>
          <table:table-cell office:value-type="percentage" office:value="0.955343371281675" calcext:value-type="percentage">
            <text:p>95,53%</text:p>
          </table:table-cell>
          <table:table-cell office:value-type="percentage" office:value="0.00779742871290571" calcext:value-type="percentage">
            <text:p>0,78%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7942" calcext:value-type="float">
            <text:p>57.942</text:p>
          </table:table-cell>
          <table:table-cell office:value-type="percentage" office:value="0.798990609357548" calcext:value-type="percentage">
            <text:p>79,90%</text:p>
          </table:table-cell>
          <table:table-cell office:value-type="percentage" office:value="0.0347350360946554" calcext:value-type="percentage">
            <text:p>3,47%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136386" calcext:value-type="float">
            <text:p>136.386</text:p>
          </table:table-cell>
          <table:table-cell office:value-type="percentage" office:value="0.784621226067747" calcext:value-type="percentage">
            <text:p>78,46%</text:p>
          </table:table-cell>
          <table:table-cell office:value-type="percentage" office:value="0.0817605990957453" calcext:value-type="percentage">
            <text:p>8,18%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99953" calcext:value-type="float">
            <text:p>99.953</text:p>
          </table:table-cell>
          <table:table-cell office:value-type="percentage" office:value="0.889990027424582" calcext:value-type="percentage">
            <text:p>89,00%</text:p>
          </table:table-cell>
          <table:table-cell office:value-type="percentage" office:value="0.0599197656754874" calcext:value-type="percentage">
            <text:p>5,99%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23897" calcext:value-type="float">
            <text:p>23.897</text:p>
          </table:table-cell>
          <table:table-cell office:value-type="percentage" office:value="0.665135827209976" calcext:value-type="percentage">
            <text:p>66,51%</text:p>
          </table:table-cell>
          <table:table-cell office:value-type="percentage" office:value="0.0143257595104411" calcext:value-type="percentage">
            <text:p>1,43%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32807" calcext:value-type="float">
            <text:p>32.807</text:p>
          </table:table-cell>
          <table:table-cell office:value-type="percentage" office:value="0.634209051015871" calcext:value-type="percentage">
            <text:p>63,42%</text:p>
          </table:table-cell>
          <table:table-cell office:value-type="percentage" office:value="0.019667121072061" calcext:value-type="percentage">
            <text:p>1,97%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60386" calcext:value-type="float">
            <text:p>60.386</text:p>
          </table:table-cell>
          <table:table-cell office:value-type="percentage" office:value="0.67286199788289" calcext:value-type="percentage">
            <text:p>67,29%</text:p>
          </table:table-cell>
          <table:table-cell office:value-type="percentage" office:value="0.0362001637777754" calcext:value-type="percentage">
            <text:p>3,62%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86669" calcext:value-type="float">
            <text:p>86.669</text:p>
          </table:table-cell>
          <table:table-cell office:value-type="percentage" office:value="0.884702543791597" calcext:value-type="percentage">
            <text:p>88,47%</text:p>
          </table:table-cell>
          <table:table-cell office:value-type="percentage" office:value="0.0519562811654359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48503" calcext:value-type="float">
            <text:p>48.503</text:p>
          </table:table-cell>
          <table:table-cell office:value-type="percentage" office:value="0.833829015454968" calcext:value-type="percentage">
            <text:p>83,38%</text:p>
          </table:table-cell>
          <table:table-cell office:value-type="percentage" office:value="0.029076549924046" calcext:value-type="percentage">
            <text:p>2,91%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6042" calcext:value-type="float">
            <text:p>16.042</text:p>
          </table:table-cell>
          <table:table-cell office:value-type="percentage" office:value="0.396245523033222" calcext:value-type="percentage">
            <text:p>39,62%</text:p>
          </table:table-cell>
          <table:table-cell office:value-type="percentage" office:value="0.00961684872856411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132637" calcext:value-type="float">
            <text:p>132.637</text:p>
          </table:table-cell>
          <table:table-cell office:value-type="percentage" office:value="0.564261495854303" calcext:value-type="percentage">
            <text:p>56,43%</text:p>
          </table:table-cell>
          <table:table-cell office:value-type="percentage" office:value="0.0795131507798628" calcext:value-type="percentage">
            <text:p>7,95%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02672" calcext:value-type="float">
            <text:p>102.672</text:p>
          </table:table-cell>
          <table:table-cell office:value-type="percentage" office:value="0.802125" calcext:value-type="percentage">
            <text:p>80,21%</text:p>
          </table:table-cell>
          <table:table-cell office:value-type="percentage" office:value="0.061549750196929" calcext:value-type="percentage">
            <text:p>6,15%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42387" calcext:value-type="float">
            <text:p>42.387</text:p>
          </table:table-cell>
          <table:table-cell office:value-type="percentage" office:value="0.832881395897194" calcext:value-type="percentage">
            <text:p>83,29%</text:p>
          </table:table-cell>
          <table:table-cell office:value-type="percentage" office:value="0.0254101338397735" calcext:value-type="percentage">
            <text:p>2,54%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6003" calcext:value-type="float">
            <text:p>46.003</text:p>
          </table:table-cell>
          <table:table-cell office:value-type="percentage" office:value="0.327104531524421" calcext:value-type="percentage">
            <text:p>32,71%</text:p>
          </table:table-cell>
          <table:table-cell office:value-type="percentage" office:value="0.0275778513938496" calcext:value-type="percentage">
            <text:p>2,76%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101508" calcext:value-type="float">
            <text:p>101.508</text:p>
          </table:table-cell>
          <table:table-cell office:value-type="percentage" office:value="0.864361317131739" calcext:value-type="percentage">
            <text:p>86,44%</text:p>
          </table:table-cell>
          <table:table-cell office:value-type="percentage" office:value="0.0608519561612696" calcext:value-type="percentage">
            <text:p>6,09%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39096" calcext:value-type="float">
            <text:p>39.096</text:p>
          </table:table-cell>
          <table:table-cell office:value-type="percentage" office:value="0.92541482235425" calcext:value-type="percentage">
            <text:p>92,54%</text:p>
          </table:table-cell>
          <table:table-cell office:value-type="percentage" office:value="0.023437247094623" calcext:value-type="percentage">
            <text:p>2,34%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100795" calcext:value-type="float">
            <text:p>100.795</text:p>
          </table:table-cell>
          <table:table-cell office:value-type="percentage" office:value="0.558826627635569" calcext:value-type="percentage">
            <text:p>55,88%</text:p>
          </table:table-cell>
          <table:table-cell office:value-type="percentage" office:value="0.0604245273404576" calcext:value-type="percentage">
            <text:p>6,04%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33431" calcext:value-type="float">
            <text:p>33.431</text:p>
          </table:table-cell>
          <table:table-cell office:value-type="percentage" office:value="0.835002622574119" calcext:value-type="percentage">
            <text:p>83,50%</text:p>
          </table:table-cell>
          <table:table-cell office:value-type="percentage" office:value="0.020041196225198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41952" calcext:value-type="float">
            <text:p>41.952</text:p>
          </table:table-cell>
          <table:table-cell office:value-type="percentage" office:value="0.346877015428883" calcext:value-type="percentage">
            <text:p>34,69%</text:p>
          </table:table-cell>
          <table:table-cell office:value-type="percentage" office:value="0.0251493602955194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7921" calcext:value-type="float">
            <text:p>17.921</text:p>
          </table:table-cell>
          <table:table-cell office:value-type="percentage" office:value="0.719689972290269" calcext:value-type="percentage">
            <text:p>71,97%</text:p>
          </table:table-cell>
          <table:table-cell office:value-type="percentage" office:value="0.0107432705438597" calcext:value-type="percentage">
            <text:p>1,07%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2002" calcext:value-type="float">
            <text:p>12.002</text:p>
          </table:table-cell>
          <table:table-cell office:value-type="percentage" office:value="0.916813077686961" calcext:value-type="percentage">
            <text:p>91,68%</text:p>
          </table:table-cell>
          <table:table-cell office:value-type="percentage" office:value="0.00719495190376677" calcext:value-type="percentage">
            <text:p>0,72%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62525" calcext:value-type="float">
            <text:p>62.525</text:p>
          </table:table-cell>
          <table:table-cell office:value-type="percentage" office:value="0.636697826928169" calcext:value-type="percentage">
            <text:p>63,67%</text:p>
          </table:table-cell>
          <table:table-cell office:value-type="percentage" office:value="0.0374824502402114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262887" calcext:value-type="float">
            <text:p>262.887</text:p>
          </table:table-cell>
          <table:table-cell office:value-type="percentage" office:value="0.512930227113088" calcext:value-type="percentage">
            <text:p>51,29%</text:p>
          </table:table-cell>
          <table:table-cell office:value-type="percentage" office:value="0.157595344203094" calcext:value-type="percentage">
            <text:p>15,76%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24848" calcext:value-type="float">
            <text:p>24.848</text:p>
          </table:table-cell>
          <table:table-cell office:value-type="percentage" office:value="0.871126069274996" calcext:value-type="percentage">
            <text:p>87,11%</text:p>
          </table:table-cell>
          <table:table-cell office:value-type="percentage" office:value="0.0148958644313278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18161" calcext:value-type="float">
            <text:p>18.161</text:p>
          </table:table-cell>
          <table:table-cell office:value-type="percentage" office:value="0.805401569914409" calcext:value-type="percentage">
            <text:p>80,54%</text:p>
          </table:table-cell>
          <table:table-cell office:value-type="percentage" office:value="0.0108871456027586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27 UFs</text:p>
          </table:table-cell>
          <table:table-cell office:value-type="float" office:value="1668114" calcext:value-type="float">
            <text:p>1.668.114</text:p>
          </table:table-cell>
          <table:table-cell office:value-type="percentage" office:value="0.651118183925974" calcext:value-type="percentage">
            <text:p>65,11%</text:p>
          </table:table-cell>
          <table:table-cell office:value-type="percentage" office:value="1" calcext:value-type="percentage">
            <text:p>10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2T23:11:30.567656798</dc:date>
    <meta:editing-duration>PT39M40S</meta:editing-duration>
    <meta:editing-cycles>2</meta:editing-cycles>
    <meta:generator>LibreOffice/25.2.6.2$Linux_X86_64 LibreOffice_project/40d1a0e1d5bdf1afaeae24d9ece32bbb00fa66a4</meta:generator>
    <meta:document-statistic meta:table-count="2" meta:cell-count="203" meta:object-count="0"/>
  </office:meta>
</office:document-meta>
</file>